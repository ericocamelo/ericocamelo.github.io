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>
      <style:text-properties officeooo:rsid="000cee3c" officeooo:paragraph-rsid="000cee3c"/>
    </style:style>
    <style:style style:name="P5" style:family="paragraph" style:parent-style-name="Text_20_body">
      <style:text-properties officeooo:rsid="000f6f82" officeooo:paragraph-rsid="000f6f82"/>
    </style:style>
    <style:style style:name="P6" style:family="paragraph" style:parent-style-name="Text_20_body">
      <style:text-properties officeooo:paragraph-rsid="000e863a"/>
    </style:style>
    <style:style style:name="T1" style:family="text">
      <style:text-properties officeooo:rsid="000e863a"/>
    </style:style>
    <style:style style:name="T2" style:family="text">
      <style:text-properties officeooo:rsid="000f6f8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Sumário</text:p>
          </text:index-title>
          <text:p text:style-name="P1"><text:a xlink:type="simple" xlink:href="#__RefHeading___Toc1_3705945317" office:name="Introdução" text:style-name="Index_20_Link" text:visited-style-name="Index_20_Link">Introdução<text:tab/>2</text:a></text:p>
          <text:p text:style-name="P1"><text:a xlink:type="simple" xlink:href="#__RefHeading___Toc3_3705945317" office:name="Capítulo 1: Hardware" text:style-name="Index_20_Link" text:visited-style-name="Index_20_Link">Capítulo 1: Hardware<text:tab/>3</text:a></text:p>
          <text:p text:style-name="P2"><text:a xlink:type="simple" xlink:href="#__RefHeading___Toc5_3705945317" office:name="Processador (CPU)" text:style-name="Index_20_Link" text:visited-style-name="Index_20_Link">Processador (CPU)<text:tab/>3</text:a></text:p>
          <text:p text:style-name="P2"><text:a xlink:type="simple" xlink:href="#__RefHeading___Toc7_3705945317" office:name="Memória RAM" text:style-name="Index_20_Link" text:visited-style-name="Index_20_Link">Memória RAM<text:tab/>3</text:a></text:p>
          <text:p text:style-name="P2"><text:a xlink:type="simple" xlink:href="#__RefHeading___Toc9_3705945317" office:name="Armazenamento (HD/SSD) Placa Mãe" text:style-name="Index_20_Link" text:visited-style-name="Index_20_Link">Armazenamento (HD/SSD) Placa Mãe<text:tab/>3</text:a></text:p>
          <text:p text:style-name="P1"><text:a xlink:type="simple" xlink:href="#__RefHeading___Toc11_3705945317" office:name="Capítulo 2: Software" text:style-name="Index_20_Link" text:visited-style-name="Index_20_Link">Capítulo 2: Software<text:tab/>4</text:a></text:p>
          <text:p text:style-name="P2"><text:a xlink:type="simple" xlink:href="#__RefHeading___Toc13_3705945317" office:name="Sistemas Operacionais" text:style-name="Index_20_Link" text:visited-style-name="Index_20_Link">Sistemas Operacionais<text:tab/>4</text:a></text:p>
          <text:p text:style-name="P2"><text:a xlink:type="simple" xlink:href="#__RefHeading___Toc15_3705945317" office:name="Software de Aplicativo" text:style-name="Index_20_Link" text:visited-style-name="Index_20_Link">Software de Aplicativo<text:tab/>4</text:a></text:p>
          <text:p text:style-name="P1"><text:a xlink:type="simple" xlink:href="#__RefHeading___Toc17_3705945317" office:name="Conclusão" text:style-name="Index_20_Link" text:visited-style-name="Index_20_Link">Conclusão<text:tab/>5</text:a></text:p>
          <text:p text:style-name="P1"><text:a xlink:type="simple" xlink:href="#__RefHeading___Toc320_3705945317" office:name="Bibliografia" text:style-name="Index_20_Link" text:visited-style-name="Index_20_Link">Bibliografia<text:tab/>6</text:a></text:p>
        </text:index-body>
      </text:table-of-content>
      <text:p text:style-name="Standard"/>
      <text:h text:style-name="P3" text:outline-level="1"><text:bookmark-start text:name="__RefHeading___Toc1_3705945317"/>Introdução<text:bookmark-end text:name="__RefHeading___Toc1_3705945317"/></text:h>
      <text:p text:style-name="P4">Este trabalho tem como objetivo apresentar uma pesquisa sobre hardware e software para a disciplina de informática básica. São abordados os temas de hardware, incluindo processador, memória, armazenamento e placa mãe. No âmbito do software, são abordados os sistemas operacionais e softwares de aplicativos. </text:p>
      <text:h text:style-name="P3" text:outline-level="1"><text:bookmark-start text:name="__RefHeading___Toc3_3705945317"/>Capítulo 1: Hardware<text:bookmark-end text:name="__RefHeading___Toc3_3705945317"/></text:h>
      <text:p text:style-name="P4">Hardware é um termo que se refere aos equipamentos eletrônicos que compõe um computador. A seguir, estão descritos os principais dispositivos de um computador <text:span text:style-name="T1">(Wikipédia)</text:span>.</text:p>
      <text:h text:style-name="Heading_20_2" text:outline-level="2"><text:bookmark-start text:name="__RefHeading___Toc5_3705945317"/>Processador (CPU)<text:bookmark-end text:name="__RefHeading___Toc5_3705945317"/></text:h>
      <text:p text:style-name="Text_20_body">É <text:span text:style-name="T1">a principal unidade do computador. Ele é responsável por executar todas as operações do sistema. É formado por circuitos eletrônicos e sem ele não seria possível executar softwares de aplicativo nem sistemas operacionais. O processador também é responsável por gerencias várias outras operações (IBM).</text:span></text:p>
      <text:h text:style-name="Heading_20_2" text:outline-level="2"><text:bookmark-start text:name="__RefHeading___Toc7_3705945317"/>Memória RAM<text:bookmark-end text:name="__RefHeading___Toc7_3705945317"/></text:h>
      <text:h text:style-name="Heading_20_2" text:outline-level="2"><text:bookmark-start text:name="__RefHeading___Toc9_3705945317"/>Armazenamento (HD/SSD)<text:line-break/><text:line-break/>Placa Mãe<text:bookmark-end text:name="__RefHeading___Toc9_3705945317"/></text:h>
      <text:h text:style-name="P3" text:outline-level="1"><text:bookmark-start text:name="__RefHeading___Toc11_3705945317"/>Capítulo 2: Software<text:bookmark-end text:name="__RefHeading___Toc11_3705945317"/></text:h>
      <text:h text:style-name="Heading_20_2" text:outline-level="2"><text:bookmark-start text:name="__RefHeading___Toc13_3705945317"/>Sistemas Operacionais<text:bookmark-end text:name="__RefHeading___Toc13_3705945317"/></text:h>
      <text:h text:style-name="Heading_20_2" text:outline-level="2"><text:bookmark-start text:name="__RefHeading___Toc15_3705945317"/>Software de Aplicativo<text:bookmark-end text:name="__RefHeading___Toc15_3705945317"/></text:h>
      <text:h text:style-name="P3" text:outline-level="1"><text:bookmark-start text:name="__RefHeading___Toc17_3705945317"/>Conclusão<text:bookmark-end text:name="__RefHeading___Toc17_3705945317"/></text:h>
      <text:p text:style-name="P5">Neste trabalho foram descritos os componentes de hardware e software que formam um computador. </text:p>
      <text:h text:style-name="P3" text:outline-level="1"><text:bookmark-start text:name="__RefHeading___Toc320_3705945317"/>Bibliografia<text:bookmark-end text:name="__RefHeading___Toc320_3705945317"/></text:h>
      <text:p text:style-name="Text_20_body"><text:span text:style-name="T1">1. Wikipedia, Hardware, disponível em: </text:span><text:a xlink:type="simple" xlink:href="https://pt.wikipedia.org/wiki/Hardware" text:style-name="Internet_20_link" text:visited-style-name="Visited_20_Internet_20_Link">https://pt.wikipedia.org/wiki/Hardware</text:a>. <text:span text:style-name="T1">Acessado em 05/05/2026.</text:span></text:p>
      <text:p text:style-name="P6"><text:span text:style-name="T1">2. IBM, O que é uma unidade central de processamento (CPU)?, </text:span><text:span text:style-name="T2">disponível em: </text:span><text:a xlink:type="simple" xlink:href="https://www.ibm.com/br-pt/think/topics/central-processing-unit" text:style-name="Internet_20_link" text:visited-style-name="Visited_20_Internet_20_Link"><text:span text:style-name="T2">https://www.ibm.com/br-pt/think/topics/central-processing-unit</text:span></text:a><text:span text:style-name="T2">. Acessado em 05/05/2026.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4:10:26.097353000</meta:creation-date>
    <dc:date>2026-05-05T15:10:35.986233000</dc:date>
    <meta:editing-duration>PT12M56S</meta:editing-duration>
    <meta:editing-cycles>2</meta:editing-cycles>
    <meta:generator>LibreOffice/25.8.1.1$MacOSX_AARCH64 LibreOffice_project/54047653041915e595ad4e45cccea684809c77b5</meta:generator>
    <meta:document-statistic meta:table-count="0" meta:image-count="0" meta:object-count="0" meta:page-count="6" meta:paragraph-count="27" meta:word-count="209" meta:character-count="1518" meta:non-whitespace-character-count="1333"/>
  </office:meta>
</office:document-meta>
</file>